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water</text:p>
          </table:table-cell>
          <table:table-cell table:number-columns-repeated="8"/>
          <table:table-cell office:value-type="string" calcext:value-type="string">
            <text:p>IF97test.i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formula="of:=40*1000*1000" office:value-type="float" office:value="40000000" calcext:value-type="float">
            <text:p>40000000</text:p>
          </table:table-cell>
          <table:table-cell office:value-type="string" calcext:value-type="string">
            <text:p>P</text:p>
          </table:table-cell>
          <table:table-cell table:formula="of:=40*1000*1000" office:value-type="float" office:value="40000000" calcext:value-type="float">
            <text:p>40000000</text:p>
          </table:table-cell>
          <table:table-cell office:value-type="string" calcext:value-type="string">
            <text:p>P</text:p>
          </table:table-cell>
          <table:table-cell table:formula="of:=40*1000*1000" office:value-type="float" office:value="40000000" calcext:value-type="float">
            <text:p>40000000</text:p>
          </table:table-cell>
          <table:table-cell office:value-type="string" calcext:value-type="string">
            <text:p>P</text:p>
          </table:table-cell>
          <table:table-cell office:value-type="float" office:value="245753.186304083" calcext:value-type="float">
            <text:p>245753.186304083</text:p>
          </table:table-cell>
          <table:table-cell office:value-type="string" calcext:value-type="string">
            <text:p>P</text:p>
          </table:table-cell>
          <table:table-cell table:formula="of:=40*1000*1000" office:value-type="float" office:value="40000000" calcext:value-type="float">
            <text:p>4000000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ORG.COOLPROP.WRAPPERS.LIBREOFFICE.CALCADDIN.PROPSSI([.A5];[.A$4];[.B$4];[.A$3];[.B$3];[.$A$1])" office:value-type="float" office:value="990.689634462755" calcext:value-type="float">
            <text:p>990.689634462755</text:p>
          </table:table-cell>
          <table:table-cell office:value-type="string" calcext:value-type="string">
            <text:p>D</text:p>
          </table:table-cell>
          <table:table-cell table:formula="of:=ORG.COOLPROP.WRAPPERS.LIBREOFFICE.CALCADDIN.PROPSSI([.C5];[.C$4];[.D$4];[.C$3];[.D$3];[.$A$1])" office:value-type="float" office:value="156.296795898433" calcext:value-type="float">
            <text:p>156.296795898433</text:p>
          </table:table-cell>
          <table:table-cell office:value-type="string" calcext:value-type="string">
            <text:p>D</text:p>
          </table:table-cell>
          <table:table-cell table:formula="of:=ORG.COOLPROP.WRAPPERS.LIBREOFFICE.CALCADDIN.PROPSSI([.E5];[.E$4];[.F$4];[.E$3];[.F$3];[.$A$1])" office:value-type="float" office:value="631.53585730493" calcext:value-type="float">
            <text:p>631.53585730493</text:p>
          </table:table-cell>
          <table:table-cell office:value-type="string" calcext:value-type="string">
            <text:p>D</text:p>
          </table:table-cell>
          <table:table-cell table:formula="of:=ORG.COOLPROP.WRAPPERS.LIBREOFFICE.CALCADDIN.PROPSSI([.G5];[.G$4];[.H$4];[.G$3];[.H$3];[.$A$1])" office:value-type="float" office:value="1.36931469222564" calcext:value-type="float">
            <text:p>1.36931469222564</text:p>
          </table:table-cell>
          <table:table-cell office:value-type="string" calcext:value-type="string">
            <text:p>D</text:p>
          </table:table-cell>
          <table:table-cell table:formula="of:=ORG.COOLPROP.WRAPPERS.LIBREOFFICE.CALCADDIN.PROPSSI([.I5];[.I$4];[.J$4];[.I$3];[.J$3];[.$A$1])" office:value-type="float" office:value="57.7451932296612" calcext:value-type="float">
            <text:p>57.745193229661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formula="of:=ORG.COOLPROP.WRAPPERS.LIBREOFFICE.CALCADDIN.PROPSSI([.A6];[.A$4];[.B$4];[.A$3];[.B$3];[.$A$1])" office:value-type="float" office:value="353852.616271524" calcext:value-type="float">
            <text:p>353852.616271524</text:p>
          </table:table-cell>
          <table:table-cell office:value-type="string" calcext:value-type="string">
            <text:p>H</text:p>
          </table:table-cell>
          <table:table-cell table:formula="of:=ORG.COOLPROP.WRAPPERS.LIBREOFFICE.CALCADDIN.PROPSSI([.C6];[.C$4];[.D$4];[.C$3];[.D$3];[.$A$1])" office:value-type="float" office:value="3049030.10527902" calcext:value-type="float">
            <text:p>3049030.10527902</text:p>
          </table:table-cell>
          <table:table-cell office:value-type="string" calcext:value-type="string">
            <text:p>H</text:p>
          </table:table-cell>
          <table:table-cell table:formula="of:=ORG.COOLPROP.WRAPPERS.LIBREOFFICE.CALCADDIN.PROPSSI([.E6];[.E$4];[.F$4];[.E$3];[.F$3];[.$A$1])" office:value-type="float" office:value="1689878.77437259" calcext:value-type="float">
            <text:p>1689878.77437259</text:p>
          </table:table-cell>
          <table:table-cell office:value-type="string" calcext:value-type="string">
            <text:p>H</text:p>
          </table:table-cell>
          <table:table-cell table:formula="of:=ORG.COOLPROP.WRAPPERS.LIBREOFFICE.CALCADDIN.PROPSSI([.G6];[.G$4];[.H$4];[.G$3];[.H$3];[.$A$1])" office:value-type="float" office:value="2715705.51494641" calcext:value-type="float">
            <text:p>2715705.51494641</text:p>
          </table:table-cell>
          <table:table-cell office:value-type="string" calcext:value-type="string">
            <text:p>H</text:p>
          </table:table-cell>
          <table:table-cell table:formula="of:=ORG.COOLPROP.WRAPPERS.LIBREOFFICE.CALCADDIN.PROPSSI([.I6];[.I$4];[.J$4];[.I$3];[.J$3];[.$A$1])" office:value-type="float" office:value="5150035.78453589" calcext:value-type="float">
            <text:p>5150035.7845358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formula="of:=ORG.COOLPROP.WRAPPERS.LIBREOFFICE.CALCADDIN.PROPSSI([.A7];[.A$4];[.B$4];[.A$3];[.B$3];[.$A$1])" office:value-type="float" office:value="1013.37035659172" calcext:value-type="float">
            <text:p>1013.37035659172</text:p>
          </table:table-cell>
          <table:table-cell office:value-type="string" calcext:value-type="string">
            <text:p>S</text:p>
          </table:table-cell>
          <table:table-cell table:formula="of:=ORG.COOLPROP.WRAPPERS.LIBREOFFICE.CALCADDIN.PROPSSI([.C7];[.C$4];[.D$4];[.C$3];[.D$3];[.$A$1])" office:value-type="float" office:value="5655.76444447625" calcext:value-type="float">
            <text:p>5655.76444447625</text:p>
          </table:table-cell>
          <table:table-cell office:value-type="string" calcext:value-type="string">
            <text:p>S</text:p>
          </table:table-cell>
          <table:table-cell table:formula="of:=ORG.COOLPROP.WRAPPERS.LIBREOFFICE.CALCADDIN.PROPSSI([.E7];[.E$4];[.F$4];[.E$3];[.F$3];[.$A$1])" office:value-type="float" office:value="3747.11182486845" calcext:value-type="float">
            <text:p>3747.11182486845</text:p>
          </table:table-cell>
          <table:table-cell office:value-type="string" calcext:value-type="string">
            <text:p>S</text:p>
          </table:table-cell>
          <table:table-cell table:formula="of:=ORG.COOLPROP.WRAPPERS.LIBREOFFICE.CALCADDIN.PROPSSI([.G7];[.G$4];[.H$4];[.G$3];[.H$3];[.$A$1])" office:value-type="float" office:value="7058.17663790294" calcext:value-type="float">
            <text:p>7058.17663790294</text:p>
          </table:table-cell>
          <table:table-cell office:value-type="string" calcext:value-type="string">
            <text:p>S</text:p>
          </table:table-cell>
          <table:table-cell table:formula="of:=ORG.COOLPROP.WRAPPERS.LIBREOFFICE.CALCADDIN.PROPSSI([.I7];[.I$4];[.J$4];[.I$3];[.J$3];[.$A$1])" office:value-type="float" office:value="7585.51200444798" calcext:value-type="float">
            <text:p>7585.512004447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ORG.COOLPROP.WRAPPERS.LIBREOFFICE.CALCADDIN.PROPSSI([.A8];[.A$4];[.B$4];[.A$3];[.B$3];[.$A$1])" office:value-type="float" office:value="313476.701748347" calcext:value-type="float">
            <text:p>313476.701748347</text:p>
          </table:table-cell>
          <table:table-cell office:value-type="string" calcext:value-type="string">
            <text:p>U</text:p>
          </table:table-cell>
          <table:table-cell table:formula="of:=ORG.COOLPROP.WRAPPERS.LIBREOFFICE.CALCADDIN.PROPSSI([.C8];[.C$4];[.D$4];[.C$3];[.D$3];[.$A$1])" office:value-type="float" office:value="2793106.75272358" calcext:value-type="float">
            <text:p>2793106.75272358</text:p>
          </table:table-cell>
          <table:table-cell office:value-type="string" calcext:value-type="string">
            <text:p>U</text:p>
          </table:table-cell>
          <table:table-cell table:formula="of:=ORG.COOLPROP.WRAPPERS.LIBREOFFICE.CALCADDIN.PROPSSI([.E8];[.E$4];[.F$4];[.E$3];[.F$3];[.$A$1])" office:value-type="float" office:value="1626541.11976844" calcext:value-type="float">
            <text:p>1626541.11976844</text:p>
          </table:table-cell>
          <table:table-cell office:value-type="string" calcext:value-type="string">
            <text:p>U</text:p>
          </table:table-cell>
          <table:table-cell table:formula="of:=ORG.COOLPROP.WRAPPERS.LIBREOFFICE.CALCADDIN.PROPSSI([.G8];[.G$4];[.H$4];[.G$3];[.H$3];[.$A$1])" office:value-type="float" office:value="2536233.8509824" calcext:value-type="float">
            <text:p>2536233.8509824</text:p>
          </table:table-cell>
          <table:table-cell office:value-type="string" calcext:value-type="string">
            <text:p>U</text:p>
          </table:table-cell>
          <table:table-cell table:formula="of:=ORG.COOLPROP.WRAPPERS.LIBREOFFICE.CALCADDIN.PROPSSI([.I8];[.I$4];[.J$4];[.I$3];[.J$3];[.$A$1])" office:value-type="float" office:value="4457337.43575712" calcext:value-type="float">
            <text:p>4457337.43575712</text:p>
          </table:table-cell>
        </table:table-row>
        <table:table-row table:style-name="ro1">
          <table:table-cell office:value-type="string" calcext:value-type="string">
            <text:p>CPMASS</text:p>
          </table:table-cell>
          <table:table-cell table:formula="of:=ORG.COOLPROP.WRAPPERS.LIBREOFFICE.CALCADDIN.PROPSSI([.A9];[.A$4];[.B$4];[.A$3];[.B$3];[.$A$1])" office:value-type="float" office:value="4116.23052840225" calcext:value-type="float">
            <text:p>4116.23052840225</text:p>
          </table:table-cell>
          <table:table-cell office:value-type="string" calcext:value-type="string">
            <text:p>CPMASS</text:p>
          </table:table-cell>
          <table:table-cell table:formula="of:=ORG.COOLPROP.WRAPPERS.LIBREOFFICE.CALCADDIN.PROPSSI([.C9];[.C$4];[.D$4];[.C$3];[.D$3];[.$A$1])" office:value-type="float" office:value="4843.7279489653" calcext:value-type="float">
            <text:p>4843.7279489653</text:p>
          </table:table-cell>
          <table:table-cell office:value-type="string" calcext:value-type="string">
            <text:p>CPMASS</text:p>
          </table:table-cell>
          <table:table-cell table:formula="of:=ORG.COOLPROP.WRAPPERS.LIBREOFFICE.CALCADDIN.PROPSSI([.E9];[.E$4];[.F$4];[.E$3];[.F$3];[.$A$1])" office:value-type="float" office:value="6293.15780832814" calcext:value-type="float">
            <text:p>6293.15780832814</text:p>
          </table:table-cell>
          <table:table-cell office:value-type="string" calcext:value-type="string">
            <text:p>CPMASS</text:p>
          </table:table-cell>
          <table:table-cell table:formula="of:=ORG.COOLPROP.WRAPPERS.LIBREOFFICE.CALCADDIN.PROPSSI([.G9];[.G$4];[.H$4];[.G$3];[.H$3];[.$A$1])" office:value-type="float" office:value="2218.26829282486" calcext:value-type="float">
            <text:p>2218.26829282486</text:p>
          </table:table-cell>
          <table:table-cell office:value-type="string" calcext:value-type="string">
            <text:p>CPMASS</text:p>
          </table:table-cell>
          <table:table-cell table:formula="of:=ORG.COOLPROP.WRAPPERS.LIBREOFFICE.CALCADDIN.PROPSSI([.I9];[.I$4];[.J$4];[.I$3];[.J$3];[.$A$1])" office:value-type="float" office:value="2763.25806650352" calcext:value-type="float">
            <text:p>2763.25806650352</text:p>
          </table:table-cell>
        </table:table-row>
        <table:table-row table:style-name="ro1">
          <table:table-cell office:value-type="string" calcext:value-type="string">
            <text:p>CVMASS</text:p>
          </table:table-cell>
          <table:table-cell table:formula="of:=ORG.COOLPROP.WRAPPERS.LIBREOFFICE.CALCADDIN.PROPSSI([.A10];[.A$4];[.B$4];[.A$3];[.B$3];[.$A$1])" office:value-type="float" office:value="3817.21668652052" calcext:value-type="float">
            <text:p>3817.21668652052</text:p>
          </table:table-cell>
          <table:table-cell office:value-type="string" calcext:value-type="string">
            <text:p>CVMASS</text:p>
          </table:table-cell>
          <table:table-cell table:formula="of:=ORG.COOLPROP.WRAPPERS.LIBREOFFICE.CALCADDIN.PROPSSI([.C10];[.C$4];[.D$4];[.C$3];[.D$3];[.$A$1])" office:value-type="float" office:value="2378.95567570649" calcext:value-type="float">
            <text:p>2378.95567570649</text:p>
          </table:table-cell>
          <table:table-cell office:value-type="string" calcext:value-type="string">
            <text:p>CVMASS</text:p>
          </table:table-cell>
          <table:table-cell table:formula="of:=ORG.COOLPROP.WRAPPERS.LIBREOFFICE.CALCADDIN.PROPSSI([.E10];[.E$4];[.F$4];[.E$3];[.F$3];[.$A$1])" office:value-type="float" office:value="2921.72520563103" calcext:value-type="float">
            <text:p>2921.72520563103</text:p>
          </table:table-cell>
          <table:table-cell office:value-type="string" calcext:value-type="string">
            <text:p>CVMASS</text:p>
          </table:table-cell>
          <table:table-cell table:formula="of:=ORG.COOLPROP.WRAPPERS.LIBREOFFICE.CALCADDIN.PROPSSI([.G10];[.G$4];[.H$4];[.G$3];[.H$3];[.$A$1])" office:value-type="float" office:value="1643.46594172285" calcext:value-type="float">
            <text:p>1643.46594172285</text:p>
          </table:table-cell>
          <table:table-cell office:value-type="string" calcext:value-type="string">
            <text:p>CVMASS</text:p>
          </table:table-cell>
          <table:table-cell table:formula="of:=ORG.COOLPROP.WRAPPERS.LIBREOFFICE.CALCADDIN.PROPSSI([.I10];[.I$4];[.J$4];[.I$3];[.J$3];[.$A$1])" office:value-type="float" office:value="2204.10305367169" calcext:value-type="float">
            <text:p>2204.1030536716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hase</text:p>
          </table:table-cell>
          <table:table-cell table:formula="of:=ORG.COOLPROP.WRAPPERS.LIBREOFFICE.CALCADDIN.PHASESI([.A$3];[.B$3];[.A$4];[.B$4];[.$A$1])" office:value-type="string" office:string-value="supercritical_liquid" calcext:value-type="string">
            <text:p>supercritical_liquid</text:p>
          </table:table-cell>
          <table:table-cell/>
          <table:table-cell table:formula="of:=ORG.COOLPROP.WRAPPERS.LIBREOFFICE.CALCADDIN.PHASESI([.C$3];[.D$3];[.C$4];[.D$4];[.$A$1])" office:value-type="string" office:string-value="supercritical" calcext:value-type="string">
            <text:p>supercritical</text:p>
          </table:table-cell>
          <table:table-cell/>
          <table:table-cell table:formula="of:=ORG.COOLPROP.WRAPPERS.LIBREOFFICE.CALCADDIN.PHASESI([.E$3];[.F$3];[.E$4];[.F$4];[.$A$1])" office:value-type="string" office:string-value="supercritical_liquid" calcext:value-type="string">
            <text:p>supercritical_liquid</text:p>
          </table:table-cell>
          <table:table-cell/>
          <table:table-cell table:formula="of:=ORG.COOLPROP.WRAPPERS.LIBREOFFICE.CALCADDIN.PHASESI([.G$3];[.H$3];[.G$4];[.H$4];[.$A$1])" office:value-type="string" office:string-value="gas" calcext:value-type="string">
            <text:p>gas</text:p>
          </table:table-cell>
          <table:table-cell/>
          <table:table-cell table:formula="of:=ORG.COOLPROP.WRAPPERS.LIBREOFFICE.CALCADDIN.PHASESI([.I$3];[.J$3];[.I$4];[.J$4];[.$A$1])" office:value-type="string" office:string-value="supercritical" calcext:value-type="string">
            <text:p>supercritical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F97bench.ino</text:p>
          </table:table-cell>
          <table:table-cell/>
          <table:table-cell office:value-type="string" calcext:value-type="string">
            <text:p>Libreoffice spreadsheet for validating the IF97duino output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table:formula="of:=101325" office:value-type="float" office:value="101325" calcext:value-type="float">
            <text:p>101325</text:p>
          </table:table-cell>
          <table:table-cell office:value-type="string" calcext:value-type="string">
            <text:p>P</text:p>
          </table:table-cell>
          <table:table-cell table:formula="of:=[.B17]" office:value-type="float" office:value="101325" calcext:value-type="float">
            <text:p>101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T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formula="of:=ORG.COOLPROP.WRAPPERS.LIBREOFFICE.CALCADDIN.PROPSSI([.A19];[.A$18];[.B$18];[.A$17];[.B$17];[.$A$1])" office:value-type="float" office:value="0.554943903490499" calcext:value-type="float">
            <text:p>0.554943903490499</text:p>
          </table:table-cell>
          <table:table-cell office:value-type="string" calcext:value-type="string">
            <text:p>D</text:p>
          </table:table-cell>
          <table:table-cell table:formula="of:=ORG.COOLPROP.WRAPPERS.LIBREOFFICE.CALCADDIN.PROPSSI([.C19];[.C$18];[.D$18];[.C$17];[.D$17];[.$A$1])" office:value-type="float" office:value="996.556935265202" calcext:value-type="float">
            <text:p>996.556935265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table:formula="of:=ORG.COOLPROP.WRAPPERS.LIBREOFFICE.CALCADDIN.PROPSSI([.A20];[.A$18];[.B$18];[.A$17];[.B$17];[.$A$1])" office:value-type="float" office:value="2730301.38592019" calcext:value-type="float">
            <text:p>2730301.38592019</text:p>
          </table:table-cell>
          <table:table-cell office:value-type="string" calcext:value-type="string">
            <text:p>H</text:p>
          </table:table-cell>
          <table:table-cell table:formula="of:=ORG.COOLPROP.WRAPPERS.LIBREOFFICE.CALCADDIN.PROPSSI([.C20];[.C$18];[.D$18];[.C$17];[.D$17];[.$A$1])" office:value-type="float" office:value="112654.899654613" calcext:value-type="float">
            <text:p>112654.8996546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table:formula="of:=ORG.COOLPROP.WRAPPERS.LIBREOFFICE.CALCADDIN.PROPSSI([.A21];[.A$18];[.B$18];[.A$17];[.B$17];[.$A$1])" office:value-type="float" office:value="7496.20215237541" calcext:value-type="float">
            <text:p>7496.20215237541</text:p>
          </table:table-cell>
          <table:table-cell office:value-type="string" calcext:value-type="string">
            <text:p>S</text:p>
          </table:table-cell>
          <table:table-cell table:formula="of:=ORG.COOLPROP.WRAPPERS.LIBREOFFICE.CALCADDIN.PROPSSI([.C21];[.C$18];[.D$18];[.C$17];[.D$17];[.$A$1])" office:value-type="float" office:value="393.062068440614" calcext:value-type="float">
            <text:p>393.0620684406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</text:p>
          </table:table-cell>
          <table:table-cell table:formula="of:=ORG.COOLPROP.WRAPPERS.LIBREOFFICE.CALCADDIN.PROPSSI([.A22];[.A$18];[.B$18];[.A$17];[.B$17];[.$A$1])" office:value-type="float" office:value="2547715.3635084" calcext:value-type="float">
            <text:p>2547715.3635084</text:p>
          </table:table-cell>
          <table:table-cell office:value-type="string" calcext:value-type="string">
            <text:p>U</text:p>
          </table:table-cell>
          <table:table-cell table:formula="of:=ORG.COOLPROP.WRAPPERS.LIBREOFFICE.CALCADDIN.PROPSSI([.C22];[.C$18];[.D$18];[.C$17];[.D$17];[.$A$1])" office:value-type="float" office:value="112553.224580754" calcext:value-type="float">
            <text:p>112553.2245807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PMASS</text:p>
          </table:table-cell>
          <table:table-cell table:formula="of:=ORG.COOLPROP.WRAPPERS.LIBREOFFICE.CALCADDIN.PROPSSI([.A23];[.A$18];[.B$18];[.A$17];[.B$17];[.$A$1])" office:value-type="float" office:value="2009.2902478487" calcext:value-type="float">
            <text:p>2009.2902478487</text:p>
          </table:table-cell>
          <table:table-cell office:value-type="string" calcext:value-type="string">
            <text:p>CPMASS</text:p>
          </table:table-cell>
          <table:table-cell table:formula="of:=ORG.COOLPROP.WRAPPERS.LIBREOFFICE.CALCADDIN.PROPSSI([.C23];[.C$18];[.D$18];[.C$17];[.D$17];[.$A$1])" office:value-type="float" office:value="4180.63577655607" calcext:value-type="float">
            <text:p>4180.635776556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VMASS</text:p>
          </table:table-cell>
          <table:table-cell table:formula="of:=ORG.COOLPROP.WRAPPERS.LIBREOFFICE.CALCADDIN.PROPSSI([.A24];[.A$18];[.B$18];[.A$17];[.B$17];[.$A$1])" office:value-type="float" office:value="1509.14824521299" calcext:value-type="float">
            <text:p>1509.14824521299</text:p>
          </table:table-cell>
          <table:table-cell office:value-type="string" calcext:value-type="string">
            <text:p>CVMASS</text:p>
          </table:table-cell>
          <table:table-cell table:formula="of:=ORG.COOLPROP.WRAPPERS.LIBREOFFICE.CALCADDIN.PROPSSI([.C24];[.C$18];[.D$18];[.C$17];[.D$17];[.$A$1])" office:value-type="float" office:value="4130.17424451454" calcext:value-type="float">
            <text:p>4130.1742445145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nthalpy drop</text:p>
          </table:table-cell>
          <table:table-cell table:number-columns-repeated="8"/>
        </table:table-row>
        <table:table-row table:style-name="ro1">
          <table:table-cell/>
          <table:table-cell table:formula="of:=[.B20]-[.D20]" office:value-type="float" office:value="2617646.48626558" calcext:value-type="float">
            <text:p>2617646.4862655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0T22:23:11.405626079</meta:creation-date>
    <dc:date>2026-06-20T22:24:14.515725573</dc:date>
    <meta:editing-duration>PT1M3S</meta:editing-duration>
    <meta:editing-cycles>1</meta:editing-cycles>
    <meta:document-statistic meta:table-count="1" meta:cell-count="131" meta:object-count="0"/>
    <meta:generator>LibreOffice/7.4.7.2$Linux_X86_64 LibreOffice_project/40$Build-2</meta:generator>
  </office:meta>
</office:document-meta>
</file>